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mport { defineConfig } from "vite";</text:p>
      <text:p text:style-name="Text_20_body">import react from "@vitejs/plugin-react";</text:p>
      <text:p text:style-name="Text_20_body">import path from "path";</text:p>
      <text:p text:style-name="Text_20_body"/>
      <text:p text:style-name="Text_20_body">export default defineConfig({</text:p>
      <text:p text:style-name="Text_20_body"><text:s text:c="2"/>plugins: [react()],</text:p>
      <text:p text:style-name="Text_20_body"><text:s text:c="2"/>resolve: {</text:p>
      <text:p text:style-name="Text_20_body"><text:s text:c="4"/>alias: {</text:p>
      <text:p text:style-name="Text_20_body"><text:s text:c="6"/>"@": path.resolve(__dirname, "./src"),</text:p>
      <text:p text:style-name="Text_20_body"><text:s text:c="4"/>},</text:p>
      <text:p text:style-name="Text_20_body"><text:s text:c="2"/>},</text:p>
      <text:p text:style-name="Text_20_body">}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18T19:26:35.092435302</dc:date>
    <meta:editing-duration>PT5M2S</meta:editing-duration>
    <meta:editing-cycles>1</meta:editing-cycles>
    <meta:document-statistic meta:table-count="0" meta:image-count="0" meta:object-count="0" meta:page-count="1" meta:paragraph-count="11" meta:word-count="29" meta:character-count="232" meta:non-whitespace-character-count="194"/>
    <meta:generator>LibreOffice/26.2.2.2$Linux_X86_64 LibreOffice_project/620$Build-2</meta:generator>
  </office:meta>
</office:document-meta>
</file>